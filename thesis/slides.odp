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00D2E3FBC1.png" manifest:media-type="image/png"/>
  <manifest:file-entry manifest:full-path="Pictures/10000001000000E1000000E13590103E.png" manifest:media-type="image/png"/>
  <manifest:file-entry manifest:full-path="Pictures/1000000100000264000001988C3A4B79.png" manifest:media-type="image/png"/>
  <manifest:file-entry manifest:full-path="Pictures/10000001000000C8000000C834666EA2.png" manifest:media-type="image/png"/>
  <manifest:file-entry manifest:full-path="Pictures/10000001000003C00000031AD34243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6.606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3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3.222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247cm" loext:decorative="fals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103cm" loext:decorative="false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04cm" loext:decorative="false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Реализация системы файлового сервера Samba</text:p>
          </draw:text-box>
        </draw:frame>
        <draw:frame presentation:style-name="pr2" draw:text-style-name="P2" draw:layer="layout" svg:width="13.769cm" svg:height="9.134cm" svg:x="0.836cm" svg:y="3.679cm" presentation:class="subtitle" presentation:user-transformed="true">
          <draw:text-box>
            <text:p text:style-name="P1"><text:span text:style-name="T1">Выполнили</text:span></text:p>
            <text:list text:style-name="L2">
              <text:list-item>
                <text:p text:style-name="P1"><text:span text:style-name="T1">Системный администратор: Каспров Дамир</text:span></text:p>
              </text:list-item>
              <text:list-item>
                <text:p text:style-name="P1"><text:span text:style-name="T1">Инженер по мониторингу и безопасности: Каспров Дамир</text:span></text:p>
              </text:list-item>
              <text:list-item>
                <text:p text:style-name="P1"><text:span text:style-name="T1">Инженер по автоматизации структуры: Егор Петрикеев</text:span></text:p>
              </text:list-item>
            </text:list>
          </draw:text-box>
        </draw:frame>
        <draw:frame draw:style-name="gr1" draw:text-style-name="P3" draw:layer="layout" svg:width="13.979cm" svg:height="11.561cm" draw:transform="skewX (-9.21891851448127E-017) rotate (0.312413936106985) translate (12.583cm 6.107cm)">
          <draw:image xlink:href="Pictures/10000001000003C00000031AD3424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11.935cm" svg:height="2.629cm" svg:x="1.4cm" svg:y="0.628cm" presentation:class="title" presentation:user-transformed="true">
          <draw:text-box>
            <text:p>Актуальность</text:p>
          </draw:text-box>
        </draw:frame>
        <draw:frame presentation:style-name="pr4" draw:layer="layout" svg:width="11.935cm" svg:height="10.285cm" svg:x="1.4cm" svg:y="3.685cm" presentation:class="outline" presentation:user-transformed="true">
          <draw:text-box>
            <text:list text:style-name="L4">
              <text:list-header>
                <text:p><text:span text:style-name="T2">Задача: спроектировать Docker контейнер samba основанный на alpine</text:span></text:p>
                <text:p><text:span text:style-name="T2">Тема актуальна, поскольку создание собственный файловых хранилищ всегда будет востребовано офисами, учебными <text:s/>учреждениями и другими общественными институтами. </text:span></text:p>
              </text:list-header>
            </text:list>
          </draw:text-box>
        </draw:frame>
        <draw:frame draw:style-name="gr3" draw:text-style-name="P3" draw:layer="layout" svg:width="13.986cm" svg:height="15.75cm" svg:x="14.014cm" svg:y="0cm">
          <draw:image xlink:href="Pictures/1000000100000264000001988C3A4B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тек технологий проекта</text:p>
          </draw:text-box>
        </draw:frame>
        <draw:frame presentation:style-name="pr4" draw:layer="layout" svg:width="18.344cm" svg:height="9.134cm" svg:x="8.255cm" svg:y="3.566cm" presentation:class="outline" presentation:user-transformed="true">
          <draw:text-box>
            <text:list text:style-name="L4">
              <text:list-header>
                <text:p>Docker-compose – как сборщик проекта с гибкой настройкой зависимостей виртуализированной и безопасной средой</text:p>
                <text:p>Git – система контроля версий и инструмент совместной разработки, стандарт де-факто</text:p>
                <text:p>Shell скрипты для автоматического тестирования</text:p>
              </text:list-header>
            </text:list>
          </draw:text-box>
        </draw:frame>
        <draw:frame draw:style-name="gr1" draw:text-style-name="P3" draw:layer="layout" svg:width="3.68cm" svg:height="3.68cm" svg:x="5.21cm" svg:y="2.67cm">
          <draw:image xlink:href="Pictures/10000001000000E1000000E13590103E.png" xlink:type="simple" xlink:show="embed" xlink:actuate="onLoad" draw:mime-type="image/png">
            <text:p/>
          </draw:image>
        </draw:frame>
        <draw:frame draw:style-name="gr1" draw:text-style-name="P3" draw:layer="layout" svg:width="2.54cm" svg:height="2.54cm" svg:x="5.415cm" svg:y="6.485cm">
          <draw:image xlink:href="Pictures/10000001000000C8000000C834666EA2.png" xlink:type="simple" xlink:show="embed" xlink:actuate="onLoad" draw:mime-type="image/png">
            <text:p/>
          </draw:image>
        </draw:frame>
        <draw:frame draw:style-name="gr1" draw:text-style-name="P3" draw:layer="layout" svg:width="4.366cm" svg:height="2.911cm" svg:x="4.524cm" svg:y="9.525cm">
          <draw:image xlink:href="Pictures/100000010000030000000200D2E3F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3.542cm" svg:height="1.673cm" svg:x="12.7cm" svg:y="2.54cm">
          <draw:text-box>
            <text:p>Samba</text:p>
          </draw:text-box>
        </draw:frame>
        <draw:frame draw:style-name="gr5" draw:text-style-name="P5" draw:layer="layout" svg:width="7.271cm" svg:height="5.939cm" svg:x="19.399cm" svg:y="1.905cm">
          <draw:text-box>
            <text:p>public/</text:p>
            <text:p>private/</text:p>
            <text:p><text:tab/>groupname/</text:p>
            <text:p><text:tab/>username/</text:p>
            <text:p><text:tab/>...</text:p>
          </draw:text-box>
        </draw:frame>
        <draw:line draw:style-name="gr6" draw:text-style-name="P6" draw:layer="layout" svg:x1="15.372cm" svg:y1="3.211cm" svg:x2="19.399cm" svg:y2="2.54cm">
          <text:p/>
        </draw:line>
        <draw:line draw:style-name="gr7" draw:text-style-name="P6" draw:layer="layout" svg:x1="15.372cm" svg:y1="3.211cm" svg:x2="19.399cm" svg:y2="3.175cm">
          <text:p/>
        </draw:line>
        <draw:line draw:style-name="gr8" draw:text-style-name="P6" draw:layer="layout" svg:x1="15.372cm" svg:y1="3.211cm" svg:x2="20.32cm" svg:y2="3.81cm">
          <text:p/>
        </draw:line>
        <draw:line draw:style-name="gr9" draw:text-style-name="P6" draw:layer="layout" svg:x1="15.372cm" svg:y1="3.211cm" svg:x2="20.32cm" svg:y2="4.445cm">
          <text:p/>
        </draw:line>
        <draw:line draw:style-name="gr10" draw:text-style-name="P6" draw:layer="layout" svg:x1="15.372cm" svg:y1="3.211cm" svg:x2="20.32cm" svg:y2="5.08cm">
          <text:p/>
        </draw:line>
        <draw:frame draw:style-name="gr11" draw:text-style-name="P5" draw:layer="layout" svg:width="7.319cm" svg:height="1.673cm" svg:x="11.347cm" svg:y="5.449cm">
          <draw:text-box>
            <text:p>Docker (445 tcp)</text:p>
          </draw:text-box>
        </draw:frame>
        <draw:line draw:style-name="gr12" draw:text-style-name="P6" draw:layer="layout" svg:x1="13.583cm" svg:y1="5.449cm" svg:x2="13.583cm" svg:y2="3.397cm">
          <text:p/>
        </draw:line>
        <draw:frame draw:style-name="gr13" draw:text-style-name="P5" draw:layer="layout" svg:width="2.234cm" svg:height="1.673cm" svg:x="12.689cm" svg:y="9.179cm">
          <draw:text-box>
            <text:p>ПК</text:p>
          </draw:text-box>
        </draw:frame>
        <draw:line draw:style-name="gr14" draw:text-style-name="P6" draw:layer="layout" svg:x1="13.583cm" svg:y1="9.179cm" svg:x2="13.583cm" svg:y2="6.35cm">
          <text:p/>
        </draw:line>
        <draw:frame draw:style-name="gr15" draw:text-style-name="P5" draw:layer="layout" svg:width="3.132cm" svg:height="1.673cm" svg:x="12.241cm" svg:y="12.722cm">
          <draw:text-box>
            <text:p>Шлюз</text:p>
          </draw:text-box>
        </draw:frame>
        <draw:line draw:style-name="gr16" draw:text-style-name="P6" draw:layer="layout" svg:x1="13.583cm" svg:y1="12.722cm" svg:x2="13.583cm" svg:y2="10.16cm">
          <text:p/>
        </draw:line>
        <draw:frame draw:style-name="gr17" draw:text-style-name="P5" draw:layer="layout" svg:width="8.017cm" svg:height="1.673cm" svg:x="1.952cm" svg:y="2.832cm">
          <draw:text-box>
            <text:p>Linux utils (Alpine)</text:p>
          </draw:text-box>
        </draw:frame>
        <draw:line draw:style-name="gr18" draw:text-style-name="P6" draw:layer="layout" svg:x1="7.62cm" svg:y1="3.175cm" svg:x2="12.7cm" svg:y2="3.175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ценарий выполнения проекта</text:p>
          </draw:text-box>
        </draw:frame>
        <draw:frame presentation:style-name="pr4" draw:layer="layout" svg:width="25.199cm" svg:height="9.134cm" svg:x="1.4cm" svg:y="3.257cm" presentation:class="outline" presentation:user-transformed="true">
          <draw:text-box>
            <text:list text:style-name="L4">
              <text:list-header>
                <text:p>Первоначально в контейнере настроен только один пользователь и одна группа с названиями, паролями и User ID/Group ID вынесенным в .env. Поэтому сценарий выполнения проекта только один – поднятие сервера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По окончанию проекта был сформирован и успешно запущен контейнер файлового сервера общего доступа с публичной и приватными директориями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10:07:37.772605404</meta:creation-date>
    <dc:date>2026-06-06T11:08:21.784483789</dc:date>
    <meta:editing-duration>PT20M19S</meta:editing-duration>
    <meta:editing-cycles>3</meta:editing-cycles>
    <meta:generator>LibreOffice/25.8.7.3$Linux_X86_64 LibreOffice_project/580$Build-3</meta:generator>
    <meta:document-statistic meta:object-count="63"/>
  </office:meta>
</office:document-meta>
</file>